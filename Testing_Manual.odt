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01cm" table:align="center"/>
    </style:style>
    <style:style style:name="Table1.A" style:family="table-column">
      <style:table-column-properties style:column-width="2.194cm"/>
    </style:style>
    <style:style style:name="Table1.B" style:family="table-column">
      <style:table-column-properties style:column-width="2.302cm"/>
    </style:style>
    <style:style style:name="Table1.C" style:family="table-column">
      <style:table-column-properties style:column-width="2.514cm"/>
    </style:style>
    <style:style style:name="Table1.A1" style:family="table-cell">
      <style:table-cell-properties fo:padding-left="0.101cm" fo:padding-right="0.101cm" fo:padding-top="0.499cm" fo:padding-bottom="0.499cm" fo:border-left="0.5pt solid #000000" fo:border-right="none" fo:border-top="0.5pt solid #000000" fo:border-bottom="0.5pt solid #000000"/>
    </style:style>
    <style:style style:name="Table1.C1" style:family="table-cell">
      <style:table-cell-properties fo:padding-left="0.101cm" fo:padding-right="0.101cm" fo:padding-top="0.499cm" fo:padding-bottom="0.499cm" fo:border="0.5pt solid #000000"/>
    </style:style>
    <style:style style:name="Table1.A2" style:family="table-cell">
      <style:table-cell-properties fo:padding-left="0.101cm" fo:padding-right="0.101cm" fo:padding-top="0.499cm" fo:padding-bottom="0.499cm" fo:border-left="0.5pt solid #000000" fo:border-right="none" fo:border-top="none" fo:border-bottom="0.5pt solid #000000"/>
    </style:style>
    <style:style style:name="Table1.C2" style:family="table-cell">
      <style:table-cell-properties fo:padding-left="0.101cm" fo:padding-right="0.101cm" fo:padding-top="0.499cm" fo:padding-bottom="0.499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imes New Roman" officeooo:rsid="000ba384" officeooo:paragraph-rsid="000ba384"/>
    </style:style>
    <style:style style:name="P2" style:family="paragraph" style:parent-style-name="Standard">
      <style:text-properties style:font-name="Times New Roman" officeooo:rsid="000c7dbd" officeooo:paragraph-rsid="000ba384"/>
    </style:style>
    <style:style style:name="P3" style:family="paragraph" style:parent-style-name="Standard">
      <style:text-properties style:font-name="Times New Roman" officeooo:rsid="000c7dbd" officeooo:paragraph-rsid="000c7dbd"/>
    </style:style>
    <style:style style:name="P4" style:family="paragraph" style:parent-style-name="Standard">
      <style:text-properties style:font-name="Times New Roman" officeooo:rsid="000c7dbd" officeooo:paragraph-rsid="00182310"/>
    </style:style>
    <style:style style:name="P5" style:family="paragraph" style:parent-style-name="Standard">
      <style:text-properties style:font-name="Times New Roman" officeooo:rsid="00127da6" officeooo:paragraph-rsid="00127da6"/>
    </style:style>
    <style:style style:name="P6" style:family="paragraph" style:parent-style-name="Standard">
      <style:text-properties style:font-name="Times New Roman"/>
    </style:style>
    <style:style style:name="P7" style:family="paragraph" style:parent-style-name="Standard">
      <style:text-properties style:font-name="Times New Roman" officeooo:rsid="0013ebf7" officeooo:paragraph-rsid="000c7dbd"/>
    </style:style>
    <style:style style:name="P8" style:family="paragraph" style:parent-style-name="Standard">
      <style:paragraph-properties fo:text-align="center" style:justify-single-word="false"/>
      <style:text-properties style:font-name="Times New Roman" officeooo:rsid="0012ebc4" officeooo:paragraph-rsid="0019b899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8pt" fo:font-weight="bold" officeooo:rsid="000ba384" officeooo:paragraph-rsid="000ba384" style:font-size-asian="18pt" style:font-weight-asian="bold" style:font-size-complex="18pt" style:font-weight-complex="bold"/>
    </style:style>
    <style:style style:name="P10" style:family="paragraph" style:parent-style-name="Standard">
      <style:text-properties style:font-name="Times New Roman" officeooo:rsid="00182310" officeooo:paragraph-rsid="00182310"/>
    </style:style>
    <style:style style:name="P11" style:family="paragraph" style:parent-style-name="Standard">
      <style:paragraph-properties fo:margin-top="0cm" fo:margin-bottom="0.199cm" style:contextual-spacing="false"/>
      <style:text-properties style:font-name="Times New Roman" fo:font-size="14pt" fo:font-weight="bold" officeooo:rsid="000f7efe" officeooo:paragraph-rsid="000f7efe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.199cm" style:contextual-spacing="false"/>
      <style:text-properties style:font-name="Times New Roman" fo:font-size="14pt" fo:font-weight="bold" officeooo:rsid="000f7efe" officeooo:paragraph-rsid="0020a2f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cm" fo:margin-bottom="0.199cm" style:contextual-spacing="false"/>
      <style:text-properties style:font-name="Times New Roman" fo:font-size="14pt" fo:font-weight="bold" officeooo:rsid="0013ebf7" officeooo:paragraph-rsid="0020a2f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.199cm" style:contextual-spacing="false"/>
      <style:text-properties style:font-name="Times New Roman" fo:font-size="16pt" fo:font-weight="bold" officeooo:rsid="000c7dbd" officeooo:paragraph-rsid="000c7db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top="0cm" fo:margin-bottom="0.199cm" style:contextual-spacing="false" fo:break-before="page"/>
      <style:text-properties style:font-name="Times New Roman" fo:font-size="16pt" fo:font-weight="bold" officeooo:rsid="000c7dbd" officeooo:paragraph-rsid="000c7db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top="0cm" fo:margin-bottom="0.199cm" style:contextual-spacing="false"/>
      <style:text-properties style:font-name="Times New Roman" fo:font-size="16pt" fo:font-weight="bold" officeooo:rsid="000ba384" officeooo:paragraph-rsid="000ba384" style:font-size-asian="16pt" style:font-weight-asian="bold" style:font-size-complex="16pt" style:font-weight-complex="bold"/>
    </style:style>
    <style:style style:name="P17" style:family="paragraph" style:parent-style-name="Standard">
      <style:text-properties style:font-name="Times New Roman" officeooo:rsid="002206ee" officeooo:paragraph-rsid="002206ee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Times New Roman" officeooo:rsid="002206ee" officeooo:paragraph-rsid="002206ee"/>
    </style:style>
    <style:style style:name="P19" style:family="paragraph" style:parent-style-name="Standard">
      <style:paragraph-properties fo:text-align="center" style:justify-single-word="false"/>
      <style:text-properties style:font-name="Times New Roman" officeooo:rsid="0018a332" officeooo:paragraph-rsid="0019b899"/>
    </style:style>
    <style:style style:name="P20" style:family="paragraph" style:parent-style-name="Standard">
      <style:paragraph-properties fo:margin-top="0cm" fo:margin-bottom="0.199cm" style:contextual-spacing="false" fo:text-align="justify" style:justify-single-word="false"/>
      <style:text-properties fo:font-style="italic" style:font-style-asian="italic" style:font-style-complex="italic"/>
    </style:style>
    <style:style style:name="P21" style:family="paragraph" style:parent-style-name="Standard" style:list-style-name="L1">
      <style:text-properties style:font-name="Times New Roman" officeooo:rsid="000c7dbd" officeooo:paragraph-rsid="00182310"/>
    </style:style>
    <style:style style:name="P22" style:family="paragraph" style:parent-style-name="Standard" style:list-style-name="L1">
      <style:text-properties style:font-name="Times New Roman" officeooo:rsid="000c7dbd" officeooo:paragraph-rsid="000c7dbd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Times New Roman" officeooo:rsid="000c7dbd" officeooo:paragraph-rsid="000c7dbd"/>
    </style:style>
    <style:style style:name="P24" style:family="paragraph" style:parent-style-name="Standard" style:list-style-name="L2">
      <style:text-properties style:font-name="Times New Roman" officeooo:rsid="000f7efe" officeooo:paragraph-rsid="000f7efe"/>
    </style:style>
    <style:style style:name="P25" style:family="paragraph" style:parent-style-name="Standard" style:list-style-name="L5">
      <style:text-properties style:font-name="Times New Roman" officeooo:rsid="000f7efe" officeooo:paragraph-rsid="000f7efe"/>
    </style:style>
    <style:style style:name="P26" style:family="paragraph" style:parent-style-name="Standard" style:list-style-name="L8">
      <style:text-properties style:font-name="Times New Roman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3pt" fo:font-style="italic" officeooo:rsid="00127da6" officeooo:paragraph-rsid="00127da6" style:font-size-asian="13pt" style:font-style-asian="italic" style:font-size-complex="13pt" style:font-style-complex="italic"/>
    </style:style>
    <style:style style:name="P28" style:family="paragraph" style:parent-style-name="Text_20_body" style:list-style-name="L4"/>
    <style:style style:name="P29" style:family="paragraph" style:parent-style-name="Text_20_body">
      <style:paragraph-properties fo:text-align="justify" style:justify-single-word="false"/>
      <style:text-properties style:font-name="Times New Roman" officeooo:rsid="000c7dbd" officeooo:paragraph-rsid="001f303a"/>
    </style:style>
    <style:style style:name="P30" style:family="paragraph" style:parent-style-name="Text_20_body" style:list-style-name="L6">
      <style:paragraph-properties fo:text-align="justify" style:justify-single-word="false"/>
      <style:text-properties style:font-name="Times New Roman" officeooo:rsid="000c7dbd" officeooo:paragraph-rsid="000c7dbd"/>
    </style:style>
    <style:style style:name="P31" style:family="paragraph" style:parent-style-name="Text_20_body">
      <style:text-properties style:font-name="Times New Roman" officeooo:rsid="000c7dbd" officeooo:paragraph-rsid="000c7dbd"/>
    </style:style>
    <style:style style:name="P32" style:family="paragraph" style:parent-style-name="Text_20_body" style:list-style-name="L7">
      <style:text-properties style:font-name="Times New Roman"/>
    </style:style>
    <style:style style:name="P33" style:family="paragraph" style:parent-style-name="Text_20_body" style:list-style-name="L9">
      <style:text-properties style:font-name="Times New Roman"/>
    </style:style>
    <style:style style:name="P34" style:family="paragraph" style:parent-style-name="Text_20_body">
      <style:paragraph-properties fo:text-align="justify" style:justify-single-word="false"/>
      <style:text-properties style:font-name="Times New Roman" officeooo:rsid="002206ee" officeooo:paragraph-rsid="002206ee"/>
    </style:style>
    <style:style style:name="P35" style:family="paragraph" style:parent-style-name="Text_20_body" style:list-style-name="L6">
      <style:paragraph-properties fo:text-align="justify" style:justify-single-word="false"/>
      <style:text-properties style:font-name="Times New Roman"/>
    </style:style>
    <style:style style:name="P36" style:family="paragraph" style:parent-style-name="Text_20_body" style:list-style-name="L7"/>
    <style:style style:name="P37" style:family="paragraph" style:parent-style-name="Text_20_body" style:list-style-name="L9"/>
    <style:style style:name="P38" style:family="paragraph" style:parent-style-name="Text_20_body" style:list-style-name="L9">
      <style:text-properties officeooo:paragraph-rsid="001f303a"/>
    </style:style>
    <style:style style:name="P39" style:family="paragraph" style:parent-style-name="Text_20_body" style:list-style-name="L9">
      <style:text-properties officeooo:paragraph-rsid="0023d577"/>
    </style:style>
    <style:style style:name="P40" style:family="paragraph" style:parent-style-name="Text_20_body" style:list-style-name="L3">
      <style:paragraph-properties fo:text-align="justify" style:justify-single-word="false"/>
    </style:style>
    <style:style style:name="P41" style:family="paragraph" style:parent-style-name="Text_20_body" style:list-style-name="L3">
      <style:paragraph-properties fo:text-align="justify" style:justify-single-word="false"/>
      <style:text-properties officeooo:paragraph-rsid="00226864"/>
    </style:style>
    <style:style style:name="P42" style:family="paragraph" style:parent-style-name="Text_20_body">
      <style:paragraph-properties fo:text-align="justify" style:justify-single-word="false"/>
      <style:text-properties officeooo:paragraph-rsid="0023d577"/>
    </style:style>
    <style:style style:name="P43" style:family="paragraph" style:parent-style-name="Text_20_body" style:list-style-name="L6">
      <style:paragraph-properties fo:text-align="justify" style:justify-single-word="false"/>
    </style:style>
    <style:style style:name="P44" style:family="paragraph" style:parent-style-name="Text_20_body" style:list-style-name="L6">
      <style:paragraph-properties fo:text-align="justify" style:justify-single-word="false"/>
      <style:text-properties officeooo:paragraph-rsid="00226864"/>
    </style:style>
    <style:style style:name="P45" style:family="paragraph" style:parent-style-name="Text_20_body">
      <style:text-properties officeooo:paragraph-rsid="0023d577"/>
    </style:style>
    <style:style style:name="T1" style:family="text">
      <style:text-properties officeooo:rsid="000ca5ad"/>
    </style:style>
    <style:style style:name="T2" style:family="text">
      <style:text-properties officeooo:rsid="000f7efe"/>
    </style:style>
    <style:style style:name="T3" style:family="text">
      <style:text-properties officeooo:rsid="00110e37"/>
    </style:style>
    <style:style style:name="T4" style:family="text">
      <style:text-properties officeooo:rsid="00112d14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weight="bold" style:font-weight-asian="bold" style:font-weight-complex="bold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tyle="normal" style:font-style-asian="normal" style:font-style-complex="normal"/>
    </style:style>
    <style:style style:name="T9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Times New Roman" officeooo:rsid="00226864"/>
    </style:style>
    <style:style style:name="T12" style:family="text">
      <style:text-properties officeooo:rsid="0018231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8a332" style:font-weight-asian="bold" style:font-weight-complex="bold"/>
    </style:style>
    <style:style style:name="T15" style:family="text">
      <style:text-properties fo:font-weight="bold" officeooo:rsid="00226864" style:font-weight-asian="bold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6pt" officeooo:rsid="0022867d" style:font-size-asian="16pt" style:font-size-complex="16pt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officeooo:rsid="0018a332"/>
    </style:style>
    <style:style style:name="T21" style:family="text">
      <style:text-properties officeooo:rsid="0020a2f7"/>
    </style:style>
    <style:style style:name="T22" style:family="text">
      <style:text-properties officeooo:rsid="002206e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ESTING MANUAL</text:p>
      <text:p text:style-name="P17"/>
      <text:p text:style-name="P18"><text:span text:style-name="Strong_20_Emphasis"><text:span text:style-name="T16">Purpose of </text:span></text:span><text:span text:style-name="Strong_20_Emphasis"><text:span text:style-name="T17">t</text:span></text:span><text:span text:style-name="Strong_20_Emphasis"><text:span text:style-name="T16">his </text:span></text:span><text:span text:style-name="Strong_20_Emphasis"><text:span text:style-name="T17">m</text:span></text:span><text:span text:style-name="Strong_20_Emphasis"><text:span text:style-name="T16">anual:</text:span></text:span></text:p>
      <text:p text:style-name="P34">This manual is designed to guide users through performing the three strabismus detection tests without the use of a connected camera. Instead, users can capture images using their own mobile phone cameras and upload them manually into the appropriate folders for each test.</text:p>
      <text:p text:style-name="P2"/>
      <text:p text:style-name="P10"><text:span text:style-name="T18">PROCEDURE:</text:span> </text:p>
      <text:p text:style-name="P4"><text:s/></text:p>
      <text:list xml:id="list3086417740" text:style-name="L1">
        <text:list-item>
          <text:p text:style-name="P21"><text:span text:style-name="T4">N</text:span><text:span text:style-name="T3">ote</text:span> <text:span text:style-name="T12">patient</text:span> name as <text:span text:style-name="T13">Name_id_dob_date</text:span></text:p>
        </text:list-item>
        <text:list-item>
          <text:p text:style-name="P23"><text:span text:style-name="T12">D</text:span>ob <text:span text:style-name="T1">and date</text:span> will <text:span text:style-name="T12">be</text:span> in this format YYYY-MM-DD if it is 27 june 2005 then it is 2005-06-27</text:p>
        </text:list-item>
        <text:list-item>
          <text:p text:style-name="P22"><text:span text:style-name="T13">Ex:-</text:span> Teja Kumar <text:span text:style-name="T22">Narayana</text:span>_12345678_2005-06-27_2025-06-26</text:p>
        </text:list-item>
      </text:list>
      <text:p text:style-name="P3"/>
      <text:p text:style-name="P27"><text:span text:style-name="T14">Note:</text:span><text:span text:style-name="T20"> </text:span>Please ensure that all captured images are clear and that the patient's full face is clearly visible. Failure to meet these criteria may result in an error.</text:p>
      <text:p text:style-name="P1"/>
      <text:p text:style-name="P16">1. Preliminary Test</text:p>
      <text:p text:style-name="P12">Folders <text:s/><text:span text:style-name="T21">Involved</text:span>: </text:p>
      <text:list xml:id="list412032516" text:style-name="L2">
        <text:list-item>
          <text:p text:style-name="P24">preliminary</text:p>
        </text:list-item>
        <text:list-item>
          <text:p text:style-name="P24">Preliminary_Results</text:p>
        </text:list-item>
      </text:list>
      <text:p text:style-name="P6"/>
      <text:p text:style-name="P29"><text:span text:style-name="Strong_20_Emphasis"><text:span text:style-name="T19">Instructions:</text:span></text:span></text:p>
      <text:list xml:id="list2612693375" text:style-name="L3">
        <text:list-item>
          <text:p text:style-name="P40"><text:span text:style-name="T5">Store the captured image for the preliminary test in the </text:span><text:span text:style-name="Source_20_Text"><text:span text:style-name="T6">preliminary</text:span></text:span><text:span text:style-name="T5"> folder. Name the image according to the convention specified in the earlier steps.</text:span></text:p>
        </text:list-item>
        <text:list-item>
          <text:p text:style-name="P40"><text:span text:style-name="T5">Ensure the image you place is the most </text:span><text:span text:style-name="T6">recent</text:span><text:span text:style-name="T5"> among all images in the </text:span><text:span text:style-name="Source_20_Text"><text:span text:style-name="T6">preliminary</text:span></text:span><text:span text:style-name="T5"> folder.</text:span></text:p>
        </text:list-item>
        <text:list-item>
          <text:p text:style-name="P41"><text:span text:style-name="T5">After completing the steps above, open your browser and navigate to:<text:line-break/></text:span><text:a xlink:type="simple" xlink:href="http://localhost:5000/results" office:target-frame-name="_new" xlink:show="replace" text:style-name="Internet_20_link" text:visited-style-name="Visited_20_Internet_20_Link"><text:span text:style-name="Strong_20_Emphasis"><text:span text:style-name="T5">http://localhost:5000/results</text:span></text:span></text:a></text:p>
        </text:list-item>
        <text:list-item>
          <text:p text:style-name="P40">If results are not generated, try the following steps:</text:p>
          <text:list>
            <text:list-item>
              <text:p text:style-name="P40"><text:span text:style-name="T5">Clear all data from both </text:span><text:span text:style-name="Source_20_Text"><text:span text:style-name="T6">preliminary</text:span></text:span><text:span text:style-name="T5"> and </text:span><text:span text:style-name="Source_20_Text"><text:span text:style-name="T6">Preliminary_Results</text:span></text:span><text:span text:style-name="T5"> folders, or move the existing files to a backup location.</text:span></text:p>
            </text:list-item>
            <text:list-item>
              <text:p text:style-name="P40"><text:span text:style-name="T5">Then, place only the current test image in the </text:span><text:span text:style-name="Source_20_Text"><text:span text:style-name="T6">preliminary</text:span></text:span><text:span text:style-name="T5"> folder.</text:span></text:p>
            </text:list-item>
          </text:list>
        </text:list-item>
        <text:list-item>
          <text:p text:style-name="P40">If you still do not receive any results, proceed to <text:span text:style-name="T13">Step </text:span><text:span text:style-name="T15">4</text:span>.</text:p>
        </text:list-item>
      </text:list>
      <text:p text:style-name="P45"><text:span text:style-name="Strong_20_Emphasis"><text:span text:style-name="T7"/></text:span></text:p>
      <text:p text:style-name="P45"><text:span text:style-name="Strong_20_Emphasis"><text:span text:style-name="T7">Successful Execution:</text:span></text:span></text:p>
      <text:p text:style-name="P42"><text:span text:style-name="T5">If the process runs successfully, the results will be saved in the </text:span><text:span text:style-name="Source_20_Text"><text:span text:style-name="T6">Preliminary_Results</text:span></text:span><text:span text:style-name="T5"> folder. The output will include:</text:span></text:p>
      <text:list xml:id="list3977353201" text:style-name="L4">
        <text:list-item>
          <text:p text:style-name="P28">A result image with the same <text:span text:style-name="T13">name</text:span> used earlier.</text:p>
        </text:list-item>
        <text:list-item>
          <text:p text:style-name="P28">A corresponding text file with the same <text:span text:style-name="T13">name</text:span>.</text:p>
        </text:list-item>
      </text:list>
      <text:p text:style-name="P15">2. Hirschberg Test</text:p>
      <text:p text:style-name="P20"><text:span text:style-name="T13">NOTE:</text:span> The background shouldn’t be exposed to a bright setting because Hirschberg test contains use of LED light whose reflection in the iris centre is measured for operating the tests.</text:p>
      <text:p text:style-name="P11">Folders <text:span text:style-name="T21">Involved</text:span>:</text:p>
      <text:list xml:id="list2478960935" text:style-name="L5">
        <text:list-item>
          <text:p text:style-name="P25">HirschbergTestImages</text:p>
        </text:list-item>
        <text:list-item>
          <text:p text:style-name="P25">Hirschberg_Results</text:p>
        </text:list-item>
      </text:list>
      <text:p text:style-name="P5"/>
      <text:p text:style-name="P29"><text:span text:style-name="Strong_20_Emphasis"><text:span text:style-name="T19">Instructions:</text:span></text:span></text:p>
      <text:list xml:id="list1437154007" text:style-name="L6">
        <text:list-item>
          <text:p text:style-name="P30">Store the image captured for the Hirschberg test in the <text:span text:style-name="Source_20_Text"><text:span text:style-name="T6">HirschbergTestImages</text:span></text:span> folder. Use the same naming convention as mentioned in the previous steps.</text:p>
        </text:list-item>
        <text:list-item>
          <text:p text:style-name="P43"><text:span text:style-name="T5">Ensure the image is the most </text:span><text:span text:style-name="T6">recent</text:span><text:span text:style-name="T5"> among all images in the </text:span><text:span text:style-name="Source_20_Text"><text:span text:style-name="T6">HirschbergTestImages</text:span></text:span><text:span text:style-name="T5"> folder.</text:span></text:p>
        </text:list-item>
        <text:list-item>
          <text:p text:style-name="P44"><text:span text:style-name="T5">After completing the above steps, open your browser and go to:<text:line-break/></text:span><text:a xlink:type="simple" xlink:href="http://localhost:5000/hirschberg_results" office:target-frame-name="_new" xlink:show="replace" text:style-name="Internet_20_link" text:visited-style-name="Visited_20_Internet_20_Link"><text:span text:style-name="Strong_20_Emphasis"><text:span text:style-name="T5">http://localhost:5000/hirschberg_results</text:span></text:span></text:a></text:p>
        </text:list-item>
        <text:list-item>
          <text:p text:style-name="P35">If results are not being generated, follow these steps:</text:p>
          <text:list>
            <text:list-item>
              <text:p text:style-name="P43"><text:span text:style-name="T5">Clear all data from both the </text:span><text:span text:style-name="Source_20_Text"><text:span text:style-name="T6">HirschbergTestImages</text:span></text:span><text:span text:style-name="T5"> and </text:span><text:span text:style-name="Source_20_Text"><text:span text:style-name="T6">Hirschberg_Results</text:span></text:span><text:span text:style-name="T5"> folders, or move the existing files to a backup location.</text:span></text:p>
            </text:list-item>
            <text:list-item>
              <text:p text:style-name="P43"><text:span text:style-name="T5">Place only the current test image in the </text:span><text:span text:style-name="Source_20_Text"><text:span text:style-name="T6">HirschbergTestImages</text:span></text:span><text:span text:style-name="T5"> folder.</text:span></text:p>
            </text:list-item>
          </text:list>
        </text:list-item>
        <text:list-item>
          <text:p text:style-name="P43"><text:span text:style-name="T5">If results still do not appear, proceed to </text:span><text:span text:style-name="Strong_20_Emphasis"><text:span text:style-name="T5">Step </text:span></text:span><text:span text:style-name="Strong_20_Emphasis"><text:span text:style-name="T11">4</text:span></text:span><text:span text:style-name="T5">.</text:span></text:p>
        </text:list-item>
      </text:list>
      <text:p text:style-name="P45"><text:span text:style-name="Strong_20_Emphasis"><text:span text:style-name="T7"/></text:span></text:p>
      <text:p text:style-name="P45"><text:span text:style-name="Strong_20_Emphasis"><text:span text:style-name="T7">Successful Execution:</text:span></text:span></text:p>
      <text:p text:style-name="P42"><text:span text:style-name="T5">If the process runs successfully, you will find the results in the </text:span><text:span text:style-name="Source_20_Text"><text:span text:style-name="T6">Hirschberg_Results</text:span></text:span><text:span text:style-name="T5"> folder. The output will include:</text:span></text:p>
      <text:list xml:id="list953237146" text:style-name="L7">
        <text:list-item>
          <text:p text:style-name="P32">A result image with the same <text:span text:style-name="T13">name</text:span> used earlier.</text:p>
        </text:list-item>
        <text:list-item>
          <text:p text:style-name="P36"><text:span text:style-name="T5">A text file named in the format: </text:span><text:span text:style-name="Strong_20_Emphasis"><text:span text:style-name="Source_20_Text"><text:span text:style-name="T5">processed_{{patient name}}.txt</text:span></text:span></text:span></text:p>
        </text:list-item>
      </text:list>
      <text:p text:style-name="P3"/>
      <text:p text:style-name="P3"/>
      <text:p text:style-name="P3"/>
      <text:p text:style-name="P14"/>
      <text:p text:style-name="P15">3. 9 Gaze Test:</text:p>
      <text:p text:style-name="P13">Folders<text:span text:style-name="T2"> </text:span><text:span text:style-name="T21">Involved</text:span>:</text:p>
      <text:list xml:id="list1037098813" text:style-name="L8">
        <text:list-item>
          <text:p text:style-name="P26">9GazeTestImages</text:p>
        </text:list-item>
        <text:list-item>
          <text:p text:style-name="P26">9GazeResults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<text:span text:style-name="T20">gaze_</text:span>1</text:p>
          </table:table-cell>
          <table:table-cell table:style-name="Table1.A1" office:value-type="string">
            <text:p text:style-name="P19">gaze_2</text:p>
          </table:table-cell>
          <table:table-cell table:style-name="Table1.C1" office:value-type="string">
            <text:p text:style-name="P19">gaze_3</text:p>
          </table:table-cell>
        </table:table-row>
        <table:table-row>
          <table:table-cell table:style-name="Table1.A2" office:value-type="string">
            <text:p text:style-name="P19">gaze_4</text:p>
          </table:table-cell>
          <table:table-cell table:style-name="Table1.A2" office:value-type="string">
            <text:p text:style-name="P19">gaze_5</text:p>
          </table:table-cell>
          <table:table-cell table:style-name="Table1.C2" office:value-type="string">
            <text:p text:style-name="P19">gaze_6</text:p>
          </table:table-cell>
        </table:table-row>
        <table:table-row>
          <table:table-cell table:style-name="Table1.A2" office:value-type="string">
            <text:p text:style-name="P19">gaze_7</text:p>
          </table:table-cell>
          <table:table-cell table:style-name="Table1.A2" office:value-type="string">
            <text:p text:style-name="P19">gaze_8</text:p>
          </table:table-cell>
          <table:table-cell table:style-name="Table1.C2" office:value-type="string">
            <text:p text:style-name="P19">gaze_9</text:p>
          </table:table-cell>
        </table:table-row>
      </table:table>
      <text:p text:style-name="P7"/>
      <text:p text:style-name="P31"><text:span text:style-name="Strong_20_Emphasis"><text:span text:style-name="T19">Instructions:</text:span></text:span></text:p>
      <text:list xml:id="list2228271232" text:style-name="L9">
        <text:list-item>
          <text:p text:style-name="P39"><text:span text:style-name="T5">Capture all 9 images in the exact order listed above.<text:line-break/>⚠️ </text:span><text:span text:style-name="Strong_20_Emphasis"><text:span text:style-name="T5">Do not capture images out of sequence</text:span></text:span><text:span text:style-name="T5"> (e.g., </text:span><text:span text:style-name="Source_20_Text"><text:span text:style-name="T5">gaze_1</text:span></text:span><text:span text:style-name="T5">, then </text:span><text:span text:style-name="Source_20_Text"><text:span text:style-name="T5">gaze_3</text:span></text:span><text:span text:style-name="T5">). The system will treat the first captured image (regardless of name) as </text:span><text:span text:style-name="Source_20_Text"><text:span text:style-name="T5">gaze_1</text:span></text:span><text:span text:style-name="T5">. Always capture them sequentially from </text:span><text:span text:style-name="Source_20_Text"><text:span text:style-name="T5">gaze_1</text:span></text:span><text:span text:style-name="T5"> to </text:span><text:span text:style-name="Source_20_Text"><text:span text:style-name="T5">gaze_9</text:span></text:span><text:span text:style-name="T5">.</text:span></text:p>
        </text:list-item>
        <text:list-item>
          <text:p text:style-name="P37"><text:span text:style-name="T5">Name each image according to the format:<text:line-break/></text:span><text:span text:style-name="Source_20_Text"><text:span text:style-name="T5">gaze_1.jpg</text:span></text:span><text:span text:style-name="T5">, </text:span><text:span text:style-name="Source_20_Text"><text:span text:style-name="T5">gaze_2.jpg</text:span></text:span><text:span text:style-name="T5">, ..., </text:span><text:span text:style-name="Source_20_Text"><text:span text:style-name="T5">gaze_9.jpg</text:span></text:span></text:p>
        </text:list-item>
        <text:list-item>
          <text:p text:style-name="P37"><text:span text:style-name="T5">Create a folder using the naming convention defined in the earlier steps:<text:line-break/></text:span><text:span text:style-name="Strong_20_Emphasis"><text:span text:style-name="T8">{{FullName_</text:span></text:span><text:span text:style-name="Strong_20_Emphasis"><text:span text:style-name="Emphasis"><text:span text:style-name="T8">PatientID_</text:span></text:span></text:span><text:span text:style-name="Strong_20_Emphasis"><text:span text:style-name="T8">DOB}}_{{TestDate}}</text:span></text:span><text:span text:style-name="T5"><text:line-break/>Example:<text:line-break/></text:span><text:span text:style-name="Source_20_Text"><text:span text:style-name="T5">Teja Kumar Narayana_12345678_2005-06-27_2025-06-26</text:span></text:span></text:p>
          <text:list>
            <text:list-item>
              <text:p text:style-name="P37"><text:span text:style-name="Emphasis"><text:span text:style-name="T9">DOB</text:span></text:span><text:span text:style-name="Emphasis"><text:span text:style-name="T8"> and test </text:span></text:span><text:span text:style-name="Emphasis"><text:span text:style-name="T9">date</text:span></text:span><text:span text:style-name="Emphasis"><text:span text:style-name="T8"> should be in the format: </text:span></text:span><text:span text:style-name="Emphasis"><text:span text:style-name="T9">YYYY-MM-DD</text:span></text:span><text:span text:style-name="Emphasis"><text:span text:style-name="T10">.</text:span></text:span></text:p>
            </text:list-item>
          </text:list>
        </text:list-item>
        <text:list-item>
          <text:p text:style-name="P33">Place all 9 gaze images into this folder.</text:p>
        </text:list-item>
        <text:list-item>
          <text:p text:style-name="P37"><text:span text:style-name="T5">Move the folder into the </text:span><text:span text:style-name="Source_20_Text"><text:span text:style-name="T6">9GazeTestImages</text:span></text:span><text:span text:style-name="T5"> </text:span><text:span text:style-name="T11">folder</text:span><text:span text:style-name="T5">.</text:span></text:p>
        </text:list-item>
        <text:list-item>
          <text:p text:style-name="P38"><text:span text:style-name="T5">In your browser, go to the following URL:<text:line-break/></text:span><text:span text:style-name="Strong_20_Emphasis"><text:span text:style-name="T5">http://localhost:5000/9gaze_results?name={{FullName_PatientID_DOB}}</text:span></text:span><text:span text:style-name="T5"><text:line-break/>Example:<text:line-break/></text:span><text:span text:style-name="Source_20_Text"><text:span text:style-name="T6">http://localhost:5000/9gaze_results?name=Teja Kumar Narayana_12345678_2005-06-27</text:span></text:span></text:p>
        </text:list-item>
      </text:list>
      <text:p text:style-name="P45"><text:span text:style-name="Strong_20_Emphasis"><text:span text:style-name="T7">Successful Execution:</text:span></text:span></text:p>
      <text:p text:style-name="P42"><text:span text:style-name="T5">If successful, the results will be stored in the </text:span><text:span text:style-name="Source_20_Text"><text:span text:style-name="T6">9GazeResults</text:span></text:span><text:span text:style-name="T5"> folder under a subfolder named:<text:line-break/></text:span><text:span text:style-name="Strong_20_Emphasis"><text:span text:style-name="T5">{{FullName_PatientID_DOB_TestDate}}_Areal</text:span></text:span><text:span text:style-name="T5"><text:line-break/>Example:<text:line-break/></text:span><text:span text:style-name="Source_20_Text"><text:span text:style-name="T6">Teja Kumar Narayana_12345678_2005-06-27_2025-06-26_Areal</text:span>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6T18:56:46.476123030</meta:creation-date>
    <meta:generator>LibreOffice/7.3.7.2$Linux_X86_64 LibreOffice_project/30$Build-2</meta:generator>
    <dc:date>2025-06-27T12:44:49.333652285</dc:date>
    <meta:editing-duration>PT2H25M51S</meta:editing-duration>
    <meta:editing-cycles>19</meta:editing-cycles>
    <meta:document-statistic meta:table-count="1" meta:image-count="0" meta:object-count="0" meta:page-count="3" meta:paragraph-count="65" meta:word-count="609" meta:character-count="4033" meta:non-whitespace-character-count="3518"/>
  </office:meta>
</office:document-meta>
</file>